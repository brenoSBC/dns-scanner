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B000002BC090E35B99E448EB9.png" manifest:media-type="image/png"/>
  <manifest:file-entry manifest:full-path="Pictures/1000000100000685000002AB3E0575FB15364396.png" manifest:media-type="image/png"/>
  <manifest:file-entry manifest:full-path="Pictures/100000010000061C000002AA5C7246B1A86A55FC.png" manifest:media-type="image/png"/>
  <manifest:file-entry manifest:full-path="Pictures/100000010000085B000002B36DA5D32AF0535815.png" manifest:media-type="image/png"/>
  <manifest:file-entry manifest:full-path="Pictures/1000000100000685000002AB533D2F05C28458F5.png" manifest:media-type="image/png"/>
  <manifest:file-entry manifest:full-path="Pictures/1000000100000793000002B3DA4F222614A9330C.png" manifest:media-type="image/png"/>
  <manifest:file-entry manifest:full-path="Pictures/1000000100000793000002B3175309393E46B12A.png" manifest:media-type="image/png"/>
  <manifest:file-entry manifest:full-path="Pictures/10000001000004F2000002B1ED3721DE6265600D.png" manifest:media-type="image/png"/>
  <manifest:file-entry manifest:full-path="Pictures/10000001000005ED000002B451B178496F424F58.png" manifest:media-type="image/png"/>
  <manifest:file-entry manifest:full-path="Pictures/10000001000004F2000002B1AF1459DA43E5E5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1914" officeooo:paragraph-rsid="000d1914"/>
    </style:style>
    <style:style style:name="P2" style:family="paragraph" style:parent-style-name="Standard">
      <style:paragraph-properties>
        <style:tab-stops>
          <style:tab-stop style:position="6.932cm"/>
        </style:tab-stops>
      </style:paragraph-properties>
      <style:text-properties officeooo:rsid="000d1914" officeooo:paragraph-rsid="000d1914"/>
    </style:style>
    <style:style style:name="P3" style:family="paragraph" style:parent-style-name="Standard">
      <style:paragraph-properties>
        <style:tab-stops>
          <style:tab-stop style:position="6.932cm"/>
        </style:tab-stops>
      </style:paragraph-properties>
      <style:text-properties officeooo:rsid="000d1914" officeooo:paragraph-rsid="000d5c90"/>
    </style:style>
    <style:style style:name="P4" style:family="paragraph" style:parent-style-name="Standard">
      <style:paragraph-properties>
        <style:tab-stops>
          <style:tab-stop style:position="6.932cm"/>
        </style:tab-stops>
      </style:paragraph-properties>
      <style:text-properties officeooo:rsid="000d1914" officeooo:paragraph-rsid="000ee0a9"/>
    </style:style>
    <style:style style:name="P5" style:family="paragraph" style:parent-style-name="Standard">
      <style:text-properties fo:font-weight="bold" officeooo:rsid="000d1914" officeooo:paragraph-rsid="000d1914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6.932cm"/>
        </style:tab-stops>
      </style:paragraph-properties>
      <style:text-properties fo:font-weight="bold" officeooo:rsid="000d1914" officeooo:paragraph-rsid="0012a8e8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6.932cm"/>
        </style:tab-stops>
      </style:paragraph-properties>
      <style:text-properties fo:font-weight="bold" officeooo:rsid="0012a8e8" officeooo:paragraph-rsid="0012a8e8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6.932cm"/>
        </style:tab-stops>
      </style:paragraph-properties>
      <style:text-properties officeooo:rsid="0012a8e8" officeooo:paragraph-rsid="0012a8e8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2a8e8" officeooo:paragraph-rsid="0012a8e8" style:font-size-asian="15pt" style:font-weight-asian="bold" style:font-size-complex="15pt" style:font-weight-complex="bold"/>
    </style:style>
    <style:style style:name="P10" style:family="paragraph" style:parent-style-name="Standard">
      <style:paragraph-properties>
        <style:tab-stops>
          <style:tab-stop style:position="6.932cm"/>
        </style:tab-stops>
      </style:paragraph-properties>
      <style:text-properties fo:font-weight="normal" officeooo:rsid="000d1914" officeooo:paragraph-rsid="0012a8e8" style:font-weight-asian="normal" style:font-weight-complex="normal"/>
    </style:style>
    <style:style style:name="P11" style:family="paragraph" style:parent-style-name="Standard">
      <style:paragraph-properties>
        <style:tab-stops>
          <style:tab-stop style:position="6.932cm"/>
        </style:tab-stops>
      </style:paragraph-properties>
      <style:text-properties fo:font-weight="normal" officeooo:rsid="0012a8e8" officeooo:paragraph-rsid="0012a8e8" style:font-weight-asian="normal" style:font-weight-complex="normal"/>
    </style:style>
    <style:style style:name="P12" style:family="paragraph" style:parent-style-name="Text_20_body">
      <style:paragraph-properties>
        <style:tab-stops>
          <style:tab-stop style:position="6.932cm"/>
        </style:tab-stops>
      </style:paragraph-properties>
      <style:text-properties officeooo:rsid="000d1914" officeooo:paragraph-rsid="001007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5c90" style:font-weight-asian="bold" style:font-weight-complex="bold"/>
    </style:style>
    <style:style style:name="T3" style:family="text">
      <style:text-properties fo:font-weight="bold" officeooo:rsid="000ee0a9" style:font-weight-asian="bold" style:font-weight-complex="bold"/>
    </style:style>
    <style:style style:name="T4" style:family="text">
      <style:text-properties fo:font-weight="bold" officeooo:rsid="00100730" style:font-weight-asian="bold" style:font-weight-complex="bold"/>
    </style:style>
    <style:style style:name="T5" style:family="text">
      <style:text-properties officeooo:rsid="000d5c90"/>
    </style:style>
    <style:style style:name="T6" style:family="text">
      <style:text-properties officeooo:rsid="000ee0a9"/>
    </style:style>
    <style:style style:name="T7" style:family="text">
      <style:text-properties officeooo:rsid="00100730"/>
    </style:style>
    <style:style style:name="T8" style:family="text">
      <style:text-properties officeooo:rsid="0012f4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eno Spohr Bernardi da Cunha</text:p>
      <text:p text:style-name="P1"/>
      <text:p text:style-name="P1">Trabalho 1</text:p>
      <text:p text:style-name="P1"/>
      <text:p text:style-name="P9">Relatório</text:p>
      <text:p text:style-name="P1"/>
      <text:p text:style-name="P1">7.1 Análise de Bloqueio</text:p>
      <text:p text:style-name="P1"/>
      <text:p text:style-name="P5">www.example.com:</text:p>
      <text:p text:style-name="P1"/>
      <text:p text:style-name="P1"><draw:frame draw:style-name="fr3" draw:name="Image1" text:anchor-type="char" svg:width="17cm" svg:height="8.121cm" draw:z-index="0"><draw:image xlink:href="Pictures/10000001000004F2000002B1AF1459DA43E5E593.png" xlink:type="simple" xlink:show="embed" xlink:actuate="onLoad" draw:mime-type="image/png"/></draw:frame><text:s/></text:p>
      <text:p text:style-name="P1"/>
      <text:p text:style-name="P1"/>
      <text:p text:style-name="P5">www.pucrs.br:</text:p>
      <text:p text:style-name="P1"/>
      <text:p text:style-name="P1"><draw:frame draw:style-name="fr2" draw:name="Image2" text:anchor-type="char" svg:width="17cm" svg:height="8.096cm" draw:z-index="1"><draw:image xlink:href="Pictures/10000001000004F2000002B1ED3721DE6265600D.png" xlink:type="simple" xlink:show="embed" xlink:actuate="onLoad" draw:mime-type="image/png"/></draw:frame><text:s/></text:p>
      <text:p text:style-name="P1"/>
      <text:p text:style-name="P1"/>
      <text:p text:style-name="P1"/>
      <text:p text:style-name="P5"><text:soft-page-break/>internetbadguys.com:</text:p>
      <text:p text:style-name="P1"/>
      <text:p text:style-name="P1"><draw:frame draw:style-name="fr3" draw:name="Image3" text:anchor-type="char" svg:width="17cm" svg:height="7.31cm" draw:z-index="2"><draw:image xlink:href="Pictures/10000001000005ED000002B451B178496F424F58.png" xlink:type="simple" xlink:show="embed" xlink:actuate="onLoad" draw:mime-type="image/png"/></draw:frame><text:s/></text:p>
      <text:p text:style-name="P1"><text:s/></text:p>
      <text:p text:style-name="P1"/>
      <text:p text:style-name="P5">reddit.com</text:p>
      <text:p text:style-name="P1"/>
      <text:p text:style-name="P1"><draw:frame draw:style-name="fr2" draw:name="Image4" text:anchor-type="char" svg:width="17cm" svg:height="6.057cm" draw:z-index="3"><draw:image xlink:href="Pictures/1000000100000793000002B3175309393E46B12A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><text:soft-page-break/>tinder.com</text:p>
      <text:p text:style-name="P1"/>
      <text:p text:style-name="P1"><draw:frame draw:style-name="fr2" draw:name="Image5" text:anchor-type="char" svg:width="17cm" svg:height="6.057cm" draw:z-index="4"><draw:image xlink:href="Pictures/1000000100000793000002B3DA4F222614A9330C.png" xlink:type="simple" xlink:show="embed" xlink:actuate="onLoad" draw:mime-type="image/png"/></draw:frame><text:s/></text:p>
      <text:p text:style-name="P1"/>
      <text:p text:style-name="P1"/>
      <text:p text:style-name="P1"/>
      <text:p text:style-name="P5">polymarket.com:</text:p>
      <text:p text:style-name="P1"/>
      <text:p text:style-name="P1"><draw:frame draw:style-name="fr2" draw:name="Image6" text:anchor-type="char" svg:width="17cm" svg:height="5.491cm" draw:z-index="5"><draw:image xlink:href="Pictures/100000010000085B000002B36DA5D32AF0535815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/></text:p>
      <text:p text:style-name="P1"><text:soft-page-break/><text:span text:style-name="T1">pornhub.com:</text:span></text:p>
      <text:p text:style-name="P1"/>
      <text:p text:style-name="P1"><draw:frame draw:style-name="fr2" draw:name="Image7" text:anchor-type="char" svg:width="17cm" svg:height="7.412cm" draw:z-index="6"><draw:image xlink:href="Pictures/100000010000061C000002AA5C7246B1A86A55FC.png" xlink:type="simple" xlink:show="embed" xlink:actuate="onLoad" draw:mime-type="image/png"/></draw:frame><text:s/></text:p>
      <text:p text:style-name="P1"/>
      <text:p text:style-name="P1"/>
      <text:p text:style-name="P5">thepiratebay.org:</text:p>
      <text:p text:style-name="P1"/>
      <text:p text:style-name="P1"><draw:frame draw:style-name="fr2" draw:name="Image8" text:anchor-type="char" svg:width="17cm" svg:height="6.957cm" draw:z-index="7"><draw:image xlink:href="Pictures/1000000100000685000002AB3E0575FB15364396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><text:soft-page-break/>futemax.zip:</text:p>
      <text:p text:style-name="P1"/>
      <text:p text:style-name="P2"><draw:frame draw:style-name="fr2" draw:name="Image9" text:anchor-type="char" svg:width="17cm" svg:height="6.957cm" draw:z-index="8"><draw:image xlink:href="Pictures/1000000100000685000002AB533D2F05C28458F5.png" xlink:type="simple" xlink:show="embed" xlink:actuate="onLoad" draw:mime-type="image/png"/></draw:frame><text:s/></text:p>
      <text:p text:style-name="P2"/>
      <text:p text:style-name="P7">Pergunta:</text:p>
      <text:p text:style-name="P10">Quais servidores bloquearam quais domínios? Com qual técnica (NXDOMAIN, redirecionamento, recusa)?</text:p>
      <text:p text:style-name="P6"/>
      <text:p text:style-name="P8"><text:span text:style-name="T1">Resposta:</text:span></text:p>
      <text:p text:style-name="P2">Os <text:span text:style-name="T5">primeiros domínios </text:span><text:a xlink:type="simple" xlink:href="http://www.example.com/" text:style-name="Internet_20_link" text:visited-style-name="Visited_20_Internet_20_Link"><text:span text:style-name="T2">www.example.com</text:span></text:a><text:span text:style-name="T5"> e </text:span><text:span text:style-name="T2">www.pucrs.br</text:span> foram resolvidos corretamente por todos os servidores DNS testados, sem <text:span text:style-name="T5">bloqueios ou manipulações.</text:span></text:p>
      <text:p text:style-name="P2"/>
      <text:p text:style-name="P3">O domínio <text:span text:style-name="T2">internetbadguys.com</text:span>, apresentou diferenças entre os provedores DNS. Os servidores <text:span text:style-name="T5">CleanBrowsing Security</text:span> e <text:span text:style-name="T5">CleanBrowsing Family</text:span> retornaram <text:span text:style-name="T5">NXDOMAIN como técnica de bloqueio</text:span>. O <text:span text:style-name="T5">AdGuard Family</text:span> apresentou timeout em todas as execuções realizadas.</text:p>
      <text:p text:style-name="P3"/>
      <text:p text:style-name="P3">Para o domínio <text:span text:style-name="T2">reddit.com</text:span>, apenas o <text:span text:style-name="T5">CleanBrowsing Family </text:span>aplicou filtragem, retornando <text:span text:style-name="T5">NXDOMAIN como anteriormente</text:span>. Os demais servidores resolveram normalmente o domínio.</text:p>
      <text:p text:style-name="P3"/>
      <text:p text:style-name="P3">O domínio <text:span text:style-name="T2">tinder.com</text:span> apresentou comportamento semelhante. O <text:span text:style-name="T5">CleanBrowsing Family </text:span>retornou <text:span text:style-name="T5">NXDOMAIN</text:span>, enquanto o <text:span text:style-name="T5">AdGuard Family</text:span> respondeu com um IP divergente <text:span text:style-name="T5">(94.140.14.35),</text:span> indicando possível redirecionamento.</text:p>
      <text:p text:style-name="P3"/>
      <text:p text:style-name="P3">No domínio <text:span text:style-name="T3">poymarket.com</text:span> praticamente todos os servidores responderam normalmente. Apenas o servidor DNS da Claro apresentou timeout durante os testes.</text:p>
      <text:p text:style-name="P3"/>
      <text:p text:style-name="P4">O domínio <text:span text:style-name="T3">pornhub.com</text:span> apresentou diferentes técnicas de bloqueio dependendo do servidor DNS utilizado. O <text:span text:style-name="T6">Cloudflare Family</text:span> retornou o endereço <text:span text:style-name="T6">0.0.0.0, </text:span>bloqueio por IP nulo. <text:span text:style-name="T6">O CleanBrowsing <text:s/>Family</text:span> retornou <text:span text:style-name="T6">NXDOMAIN</text:span>, enquanto o <text:span text:style-name="T6">AdGuard Family</text:span> retornou um IP alternativo <text:span text:style-name="T5">(94.140.14.35)</text:span>, indicando redirecionamento. O <text:span text:style-name="T6">OpenDNS Family</text:span> também retornou um IP diferente do consenso, sugerindo possível filtragem.</text:p>
      <text:p text:style-name="P4"/>
      <text:p text:style-name="P12">Para o domínio <text:span text:style-name="T4">thepiratebay.org</text:span>, o <text:span text:style-name="T6">CleanBrowsing <text:s/>Family </text:span>novamente utilizou <text:span text:style-name="T7">NXDOMAIN</text:span> como mecanismo de bloqueio. O servidor DNS da Claro apresentou timeout durante as consultas.</text:p>
      <text:p text:style-name="P4">O domínio <text:span text:style-name="T4">futemax.zip</text:span> apresentou comportamento inconsistente em alguns servidores, incluindo múltiplos timeouts. Entretanto, os servidores que responderam retornaram o mesmo endereço IP.</text:p>
      <text:p text:style-name="P4"/>
      <text:p text:style-name="P4"><text:soft-page-break/></text:p>
      <text:p text:style-name="P7">Pergunta:</text:p>
      <text:p text:style-name="P8">Existe consenso entre filtros da mesma categoria?</text:p>
      <text:p text:style-name="P8"/>
      <text:p text:style-name="P7">Resposta:</text:p>
      <text:p text:style-name="P8">Sim. O padrão mais vísivel são os filtros Family, onde há um maior índice de bloqueios, sendo o site pornográfico bloqueado pelos 4 DNS Family. </text:p>
      <text:p text:style-name="P8"/>
      <text:p text:style-name="P7">Pergunta:</text:p>
      <text:p text:style-name="P8">É possível contornar um bloqueio DNS trocando o servidor?</text:p>
      <text:p text:style-name="P8"/>
      <text:p text:style-name="P7">Resposta:</text:p>
      <text:p text:style-name="P11">Sim. Como é possível observar nos resultados, exsitem provedores que bloqueiam certos domínios usando filtragens como retornar NXDOMAIN, IP nulo ou redirecionar, porém muitos outros que conseguem resolver normalmente.</text:p>
      <text:p text:style-name="P4"/>
      <text:p text:style-name="P4"/>
      <text:p text:style-name="P4"/>
      <text:p text:style-name="P4">7.2 Análise de Desempenho (Parte 1)</text:p>
      <text:p text:style-name="P4"/>
      <text:p text:style-name="P4"/>
      <text:p text:style-name="P4"><draw:frame draw:style-name="fr1" draw:name="Image10" text:anchor-type="char" svg:x="3.812cm" svg:y="0.191cm" svg:width="9.377cm" svg:height="11.633cm" draw:z-index="9"><draw:image xlink:href="Pictures/100000010000024B000002BC090E35B99E448EB9.png" xlink:type="simple" xlink:show="embed" xlink:actuate="onLoad" draw:mime-type="image/png"/></draw:frame></text:p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Os menores tempos de resposta foram observados no resolv.conf, seguido pelos servidores da Claro, Quad9 e Cloudflare. O resolv.conf apresentou a menor <text:span text:style-name="T8">tempo</text:span> por utilizar cache local do sistema operacional. <text:span text:style-name="T8">As filtragens não parece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8T01:02:08.422817926</meta:creation-date>
    <dc:date>2026-05-18T01:52:46.599917605</dc:date>
    <meta:editing-duration>PT37M44S</meta:editing-duration>
    <meta:editing-cycles>7</meta:editing-cycles>
    <meta:generator>LibreOffice/7.3.7.2$Linux_X86_64 LibreOffice_project/30$Build-2</meta:generator>
    <meta:document-statistic meta:table-count="0" meta:image-count="10" meta:object-count="0" meta:page-count="6" meta:paragraph-count="45" meta:word-count="363" meta:character-count="2794" meta:non-whitespace-character-count="2451"/>
  </office:meta>
</office:document-meta>
</file>